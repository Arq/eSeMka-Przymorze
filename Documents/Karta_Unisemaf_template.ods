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cm"/>
    </style:style>
    <style:style style:name="co2" style:family="table-column">
      <style:table-column-properties fo:break-before="auto" style:column-width="1.87cm"/>
    </style:style>
    <style:style style:name="co3" style:family="table-column">
      <style:table-column-properties fo:break-before="auto" style:column-width="1.674cm"/>
    </style:style>
    <style:style style:name="co4" style:family="table-column">
      <style:table-column-properties fo:break-before="auto" style:column-width="1.744cm"/>
    </style:style>
    <style:style style:name="co5" style:family="table-column">
      <style:table-column-properties fo:break-before="auto" style:column-width="1.639cm"/>
    </style:style>
    <style:style style:name="co6" style:family="table-column">
      <style:table-column-properties fo:break-before="auto" style:column-width="3.6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Karta semafora <text:s/>(unisemaf)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bit</text:p>
          </table:table-cell>
          <table:covered-table-cell table:number-columns-repeated="6" table:style-name="ce7"/>
          <table:covered-table-cell table:style-name="ce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4B</text:p>
          </table:table-cell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1B</text:p>
          </table:table-cell>
          <table:table-cell table:style-name="ce3" office:value-type="string" calcext:value-type="string">
            <text:p>1A</text:p>
          </table:table-cell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A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" office:value-type="string" calcext:value-type="string">
            <text:p>Aspekt</text:p>
          </table:table-cell>
          <table:table-cell table:number-columns-repeated="2" table:style-name="ce4" office:value-type="string" calcext:value-type="string">
            <text:p>CV</text:p>
          </table:table-cell>
          <table:table-cell table:style-name="ce4" office:value-type="string" calcext:value-type="string">
            <text:p>Zakres</text:p>
          </table:table-cell>
          <table:table-cell table:style-name="ce4" office:value-type="string" calcext:value-type="string">
            <text:p>Wartość</text:p>
          </table:table-cell>
          <table:table-cell table:style-name="ce6" office:value-type="string" calcext:value-type="string">
            <text:p>Opis</text:p>
          </table:table-cell>
          <table:table-cell table:style-name="ce6"/>
          <table:table-cell/>
        </table:table-row>
        <table:table-row table:style-name="ro1">
          <table:table-cell table:style-name="ce4"/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..6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ddr low</text:p>
          </table:table-cell>
          <table:table-cell table:style-name="ce6"/>
          <table:table-cell/>
        </table:table-row>
        <table:table-row table:style-name="ro1">
          <table:table-cell table:style-name="ce4"/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.1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ax jasność out 1</text:p>
          </table:table-cell>
          <table:table-cell table:style-name="ce6"/>
          <table:table-cell/>
        </table:table-row>
        <table:table-row table:style-name="ro1">
          <table:table-cell table:style-name="ce4"/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..1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ax jasność out 2</text:p>
          </table:table-cell>
          <table:table-cell table:style-name="ce6"/>
          <table:table-cell/>
        </table:table-row>
        <table:table-row table:style-name="ro1">
          <table:table-cell table:style-name="ce4"/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..1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ax jasność out 3</text:p>
          </table:table-cell>
          <table:table-cell table:style-name="ce6"/>
          <table:table-cell/>
        </table:table-row>
        <table:table-row table:style-name="ro1">
          <table:table-cell table:style-name="ce4"/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..1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ax jasność out 4</text:p>
          </table:table-cell>
          <table:table-cell table:style-name="ce6"/>
          <table:table-cell/>
        </table:table-row>
        <table:table-row table:style-name="ro1">
          <table:table-cell table:style-name="ce4"/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evisiion (ro)</text:p>
          </table:table-cell>
          <table:table-cell table:style-name="ce6"/>
          <table:table-cell/>
        </table:table-row>
        <table:table-row table:style-name="ro1">
          <table:table-cell table:style-name="ce4"/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anufacturer ID (ro)</text:p>
          </table:table-cell>
          <table:table-cell table:style-name="ce6"/>
          <table:table-cell/>
        </table:table-row>
        <table:table-row table:style-name="ro1">
          <table:table-cell table:style-name="ce4"/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0..7</text:p>
          </table:table-cell>
          <table:table-cell table:style-name="ce4"/>
          <table:table-cell table:style-name="ce6" office:value-type="string" calcext:value-type="string">
            <text:p>Addr Hgh</text:p>
          </table:table-cell>
          <table:table-cell table:style-name="ce6"/>
          <table:table-cell/>
        </table:table-row>
        <table:table-row table:style-name="ro1">
          <table:table-cell table:style-name="ce4"/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128" calcext:value-type="float">
            <text:p>128</text:p>
          </table:table-cell>
          <table:table-cell table:style-name="ce6" office:value-type="string" calcext:value-type="string">
            <text:p>Config (Accessory Dec)</text:p>
          </table:table-cell>
          <table:table-cell table:style-name="ce6"/>
          <table:table-cell/>
        </table:table-row>
        <table:table-row table:style-name="ro1">
          <table:table-cell table:style-name="ce4"/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..255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Ligh/Fade Speed</text:p>
          </table:table-cell>
          <table:table-cell table:style-name="ce6"/>
          <table:table-cell/>
        </table:table-row>
        <table:table-row table:style-name="ro1">
          <table:table-cell table:style-name="ce4"/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.255" calcext:value-type="float">
            <text:p>1.255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lashing period</text:p>
          </table:table-cell>
          <table:table-cell table:style-name="ce6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1+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selection</text:p>
          </table:table-cell>
          <table:table-cell table:style-name="ce8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on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flashing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phase selection</text:p>
          </table:table-cell>
          <table:covered-table-cell table:style-name="ce6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1-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selection</text:p>
          </table:table-cell>
          <table:table-cell table:style-name="ce8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on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flashing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54" calcext:value-type="float">
            <text:p>55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phase selection</text:p>
          </table:table-cell>
          <table:covered-table-cell table:style-name="ce6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2+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selection</text:p>
          </table:table-cell>
          <table:table-cell table:style-name="ce8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4" office:value-type="float" office:value="556" calcext:value-type="float">
            <text:p>55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on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flashing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phase selection</text:p>
          </table:table-cell>
          <table:covered-table-cell table:style-name="ce6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2-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selection</text:p>
          </table:table-cell>
          <table:table-cell table:style-name="ce8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on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flashing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phase selection</text:p>
          </table:table-cell>
          <table:covered-table-cell table:style-name="ce6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3+</text:p>
          </table:table-cell>
          <table:table-cell table:style-name="ce4" office:value-type="float" office:value="563" calcext:value-type="float">
            <text:p>56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selection</text:p>
          </table:table-cell>
          <table:table-cell table:style-name="ce8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on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flashing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phase selection</text:p>
          </table:table-cell>
          <table:covered-table-cell table:style-name="ce6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3-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selection</text:p>
          </table:table-cell>
          <table:table-cell table:style-name="ce8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on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flashing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phase selection</text:p>
          </table:table-cell>
          <table:covered-table-cell table:style-name="ce6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4+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selection</text:p>
          </table:table-cell>
          <table:table-cell table:style-name="ce8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on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flashing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phase selection</text:p>
          </table:table-cell>
          <table:covered-table-cell table:style-name="ce6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4-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selection</text:p>
          </table:table-cell>
          <table:table-cell table:style-name="ce8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on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flashing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phase selection</text:p>
          </table:table-cell>
          <table:covered-table-cell table:style-name="ce6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5+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selection</text:p>
          </table:table-cell>
          <table:table-cell table:style-name="ce8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on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flashing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phase selection</text:p>
          </table:table-cell>
          <table:covered-table-cell table:style-name="ce6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5-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selection</text:p>
          </table:table-cell>
          <table:table-cell table:style-name="ce8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on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flashing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phase selection</text:p>
          </table:table-cell>
          <table:covered-table-cell table:style-name="ce6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6+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selection</text:p>
          </table:table-cell>
          <table:table-cell table:style-name="ce8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on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flashing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phase selection</text:p>
          </table:table-cell>
          <table:covered-table-cell table:style-name="ce6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6-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selection</text:p>
          </table:table-cell>
          <table:table-cell table:style-name="ce8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on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flashing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94" calcext:value-type="float">
            <text:p>59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phase selection</text:p>
          </table:table-cell>
          <table:covered-table-cell table:style-name="ce6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7+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selection</text:p>
          </table:table-cell>
          <table:table-cell table:style-name="ce8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on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lights flashing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0..255</text:p>
          </table:table-cell>
          <table:table-cell table:style-name="ce4"/>
          <table:table-cell table:style-name="ce6" office:value-type="string" calcext:value-type="string">
            <text:p>phase selection</text:p>
          </table:table-cell>
          <table:covered-table-cell table:style-name="ce6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7-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0..256</text:p>
          </table:table-cell>
          <table:table-cell table:style-name="ce4"/>
          <table:table-cell table:style-name="ce6" office:value-type="string" calcext:value-type="string">
            <text:p>lights selection</text:p>
          </table:table-cell>
          <table:table-cell table:style-name="ce8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0..257</text:p>
          </table:table-cell>
          <table:table-cell table:style-name="ce4"/>
          <table:table-cell table:style-name="ce6" office:value-type="string" calcext:value-type="string">
            <text:p>lights on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601" calcext:value-type="float">
            <text:p>60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0..258</text:p>
          </table:table-cell>
          <table:table-cell table:style-name="ce4"/>
          <table:table-cell table:style-name="ce6" office:value-type="string" calcext:value-type="string">
            <text:p>lights flashing</text:p>
          </table:table-cell>
          <table:covered-table-cell table:style-name="ce6"/>
          <table:table-cell/>
        </table:table-row>
        <table:table-row table:style-name="ro1">
          <table:covered-table-cell table:style-name="ce6"/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0..259</text:p>
          </table:table-cell>
          <table:table-cell table:style-name="ce4"/>
          <table:table-cell table:style-name="ce6" office:value-type="string" calcext:value-type="string">
            <text:p>phase selection</text:p>
          </table:table-cell>
          <table:covered-table-cell table:style-name="ce6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8+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0..260</text:p>
          </table:table-cell>
          <table:table-cell table:style-name="ce4"/>
          <table:table-cell table:style-name="ce6" office:value-type="string" calcext:value-type="string">
            <text:p>lights selection</text:p>
          </table:table-cell>
          <table:table-cell table:style-name="ce8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0..261</text:p>
          </table:table-cell>
          <table:table-cell table:style-name="ce4"/>
          <table:table-cell table:style-name="ce6" office:value-type="string" calcext:value-type="string">
            <text:p>lights on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0..262</text:p>
          </table:table-cell>
          <table:table-cell table:style-name="ce4"/>
          <table:table-cell table:style-name="ce6" office:value-type="string" calcext:value-type="string">
            <text:p>lights flashing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0..263</text:p>
          </table:table-cell>
          <table:table-cell table:style-name="ce4"/>
          <table:table-cell table:style-name="ce6" office:value-type="string" calcext:value-type="string">
            <text:p>phase selection</text:p>
          </table:table-cell>
          <table:covered-table-cell table:style-name="ce6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8-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0..264</text:p>
          </table:table-cell>
          <table:table-cell table:style-name="ce4"/>
          <table:table-cell table:style-name="ce6" office:value-type="string" calcext:value-type="string">
            <text:p>lights selection</text:p>
          </table:table-cell>
          <table:table-cell table:style-name="ce8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0..265</text:p>
          </table:table-cell>
          <table:table-cell table:style-name="ce4"/>
          <table:table-cell table:style-name="ce6" office:value-type="string" calcext:value-type="string">
            <text:p>lights on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609" calcext:value-type="float">
            <text:p>609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0..266</text:p>
          </table:table-cell>
          <table:table-cell table:style-name="ce4"/>
          <table:table-cell table:style-name="ce6" office:value-type="string" calcext:value-type="string">
            <text:p>lights flashing</text:p>
          </table:table-cell>
          <table:covered-table-cell table:style-name="ce6"/>
          <table:table-cell/>
        </table:table-row>
        <table:table-row table:style-name="ro1">
          <table:covered-table-cell table:style-name="ce4"/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0..267</text:p>
          </table:table-cell>
          <table:table-cell table:style-name="ce4"/>
          <table:table-cell table:style-name="ce6" office:value-type="string" calcext:value-type="string">
            <text:p>phase selection</text:p>
          </table:table-cell>
          <table:covered-table-cell table:style-name="ce6"/>
          <table:table-cell/>
        </table:table-row>
        <table:table-row table:style-name="ro1" table:number-rows-repeated="104849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22:11:34.183000000</meta:creation-date>
    <dc:date>2024-12-23T22:57:44.384000000</dc:date>
    <meta:editing-duration>PT23M6S</meta:editing-duration>
    <meta:editing-cycles>5</meta:editing-cycles>
    <meta:generator>LibreOffice/24.2.5.2$Windows_X86_64 LibreOffice_project/bffef4ea93e59bebbeaf7f431bb02b1a39ee8a59</meta:generator>
    <meta:print-date>2024-12-23T22:56:46.488000000</meta:print-date>
    <meta:document-statistic meta:table-count="1" meta:cell-count="358" meta:object-count="0"/>
  </office:meta>
</office:document-meta>
</file>